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7E04AFB78EAA6F5B6D.png" manifest:media-type="image/png"/>
  <manifest:file-entry manifest:full-path="Pictures/10000001000007800000037EC871B9C6852CEF82.png" manifest:media-type="image/png"/>
  <manifest:file-entry manifest:full-path="Pictures/10000001000007800000037EA39B0CBA90270753.png" manifest:media-type="image/png"/>
  <manifest:file-entry manifest:full-path="Pictures/10000001000007800000037E29F9780817B4F70F.png" manifest:media-type="image/png"/>
  <manifest:file-entry manifest:full-path="Pictures/10000001000007800000037EB1307DABDF07A27B.png" manifest:media-type="image/png"/>
  <manifest:file-entry manifest:full-path="Pictures/10000001000007800000037EB5AA3AE18A6AA264.png" manifest:media-type="image/png"/>
  <manifest:file-entry manifest:full-path="Pictures/10000001000007800000037E2042B508F4022334.png" manifest:media-type="image/png"/>
  <manifest:file-entry manifest:full-path="Pictures/10000001000007800000037E418B3EFEDFC67532.png" manifest:media-type="image/png"/>
  <manifest:file-entry manifest:full-path="Pictures/1000000000000640000002FBEA4DFE82DD195C17.jpg" manifest:media-type="image/jpeg"/>
  <manifest:file-entry manifest:full-path="Pictures/10000001000007800000037E1A53CA406033A6E9.png" manifest:media-type="image/png"/>
  <manifest:file-entry manifest:full-path="Pictures/10000001000007800000037ECBD65A9C0B06036D.png" manifest:media-type="image/png"/>
  <manifest:file-entry manifest:full-path="Pictures/1000000000000640000002FA4F8FA1E19474D90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c12" officeooo:paragraph-rsid="00108c12"/>
    </style:style>
    <style:style style:name="P2" style:family="paragraph" style:parent-style-name="Standard">
      <style:text-properties officeooo:paragraph-rsid="0011896c"/>
    </style:style>
    <style:style style:name="T1" style:family="text">
      <style:text-properties officeooo:rsid="001189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Aqib muhammad</text:p>
      <text:p text:style-name="P1">202210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width="6.6929in" svg:height="3.1874in" draw:z-index="10"><draw:image xlink:href="Pictures/1000000000000640000002FA4F8FA1E19474D905.jpg" xlink:type="simple" xlink:show="embed" xlink:actuate="onLoad" draw:mime-type="image/jpeg"/></draw:frame></text:p>
      <text:p text:style-name="Standard"/>
      <text:p text:style-name="Standard"/>
      <text:p text:style-name="Standard"><draw:frame draw:style-name="fr2" draw:name="Image10" text:anchor-type="char" svg:width="6.6929in" svg:height="3.1917in" draw:z-index="9"><draw:image xlink:href="Pictures/1000000000000640000002FBEA4DFE82DD195C17.jpg" xlink:type="simple" xlink:show="embed" xlink:actuate="onLoad" draw:mime-type="image/jpeg"/></draw:frame><text:soft-page-break/></text:p>
      <text:p text:style-name="Standard"/>
      <text:p text:style-name="Standard"/>
      <text:p text:style-name="Standard"><draw:frame draw:style-name="fr2" draw:name="Image9" text:anchor-type="char" svg:width="6.6929in" svg:height="3.1161in" draw:z-index="8"><draw:image xlink:href="Pictures/10000001000007800000037E2042B508F4022334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8" text:anchor-type="char" svg:width="6.6929in" svg:height="3.1161in" draw:z-index="7"><draw:image xlink:href="Pictures/10000001000007800000037EB5AA3AE18A6AA264.png" xlink:type="simple" xlink:show="embed" xlink:actuate="onLoad" draw:mime-type="image/png"/></draw:frame><text:soft-page-break/></text:p>
      <text:p text:style-name="Standard"/>
      <text:p text:style-name="Standard"><draw:frame draw:style-name="fr2" draw:name="Image7" text:anchor-type="char" svg:width="6.6929in" svg:height="3.1161in" draw:z-index="6"><draw:image xlink:href="Pictures/10000001000007800000037ECBD65A9C0B06036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6" text:anchor-type="char" svg:width="6.6929in" svg:height="3.1161in" draw:z-index="5"><draw:image xlink:href="Pictures/10000001000007800000037E1A53CA406033A6E9.png" xlink:type="simple" xlink:show="embed" xlink:actuate="onLoad" draw:mime-type="image/png"/></draw:frame><text:soft-page-break/></text:p>
      <text:p text:style-name="Standard"/>
      <text:p text:style-name="Standard"><draw:frame draw:style-name="fr2" draw:name="Image5" text:anchor-type="char" svg:width="6.6929in" svg:height="3.1161in" draw:z-index="4"><draw:image xlink:href="Pictures/10000001000007800000037EB1307DABDF07A27B.png" xlink:type="simple" xlink:show="embed" xlink:actuate="onLoad" draw:mime-type="image/png"/></draw:frame></text:p>
      <text:p text:style-name="Standard"/>
      <text:p text:style-name="Standard"><draw:frame draw:style-name="fr2" draw:name="Image4" text:anchor-type="char" svg:width="6.6929in" svg:height="3.1161in" draw:z-index="3"><draw:image xlink:href="Pictures/10000001000007800000037EA39B0CBA90270753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2" draw:name="Image3" text:anchor-type="char" svg:width="6.6929in" svg:height="3.1161in" draw:z-index="2"><draw:image xlink:href="Pictures/10000001000007800000037EC871B9C6852CEF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><draw:frame draw:style-name="fr2" draw:name="Image1" text:anchor-type="char" svg:width="6.6929in" svg:height="3.1917in" draw:z-index="0"><draw:image xlink:href="Pictures/1000000000000640000002FBEA4DFE82DD195C17.jpg" xlink:type="simple" xlink:show="embed" xlink:actuate="onLoad" draw:mime-type="image/jpeg"/></draw:frame><draw:frame draw:style-name="fr1" draw:name="Image2" text:anchor-type="char" svg:width="6.6929in" svg:height="3.1917in" draw:z-index="1"><draw:image xlink:href="Pictures/10000001000007800000037E04AFB78EAA6F5B6D.png" xlink:type="simple" xlink:show="embed" xlink:actuate="onLoad" draw:mime-type="image/png"/></draw:frame><text:line-break/><text:line-break/><text:line-break/></text:p>
      <text:p text:style-name="P2"/>
      <text:p text:style-name="P2"><text:line-break/><text:line-break/></text:p>
      <text:p text:style-name="P2"><draw:frame draw:style-name="fr2" draw:name="Image12" text:anchor-type="char" svg:width="6.6929in" svg:height="3.1161in" draw:z-index="11"><draw:image xlink:href="Pictures/10000001000007800000037E418B3EFEDFC67532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"><draw:frame draw:style-name="fr1" draw:name="Image13" text:anchor-type="char" svg:width="6.6929in" svg:height="3.1161in" draw:z-index="12"><draw:image xlink:href="Pictures/10000001000007800000037E29F9780817B4F7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13:33:29.185796952</meta:creation-date>
    <dc:date>2026-05-12T13:46:00.504235400</dc:date>
    <meta:editing-duration>PT12M30S</meta:editing-duration>
    <meta:editing-cycles>3</meta:editing-cycles>
    <meta:generator>LibreOffice/7.3.7.2$Linux_X86_64 LibreOffice_project/30$Build-2</meta:generator>
    <meta:document-statistic meta:table-count="0" meta:image-count="13" meta:object-count="0" meta:page-count="6" meta:paragraph-count="5" meta:word-count="3" meta:character-count="40" meta:non-whitespace-character-count="19"/>
  </office:meta>
</office:document-meta>
</file>